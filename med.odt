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/>
    <style:font-face style:name="system-ui" svg:font-family="system-ui, ui-sans-serif, apple-system, BlinkMacSystemFont, Inter, NotoSansHans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75%" fo:orphans="2" fo:widows="2" fo:text-indent="0cm" style:auto-text-indent="false"/>
      <style:text-properties fo:color="#1d1d1f" loext:opacity="100%" style:font-name="Times new roman" fo:font-size="14pt" fo:letter-spacing="normal" fo:font-weight="normal" officeooo:paragraph-rsid="00195e81" style:font-size-asian="14pt" style:font-size-complex="14pt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75%" fo:orphans="2" fo:widows="2" fo:text-indent="0cm" style:auto-text-indent="false"/>
      <style:text-properties fo:font-variant="normal" fo:text-transform="none" fo:color="#1d1d1f" loext:opacity="100%" style:font-name="Times new roman" fo:font-size="14pt" fo:letter-spacing="normal" fo:font-style="normal" fo:font-weight="normal" officeooo:paragraph-rsid="00197db5" style:font-size-asian="14pt" style:font-size-complex="14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75%" fo:orphans="2" fo:widows="2" fo:text-indent="0cm" style:auto-text-indent="false"/>
      <style:text-properties fo:font-variant="normal" fo:text-transform="none" fo:color="#1d1d1f" loext:opacity="100%" style:font-name="Times new roman" fo:font-size="14pt" fo:letter-spacing="normal" fo:font-style="normal" fo:font-weight="normal" officeooo:paragraph-rsid="00195e81" style:font-size-asian="14pt" style:font-size-complex="14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1d1d1f" loext:opacity="100%" fo:font-size="15pt" loext:padding="0cm" loext:border="none"/>
    </style:style>
    <style:style style:name="T1" style:family="text">
      <style:text-properties fo:font-variant="normal" fo:text-transform="none" fo:color="#1d1d1f" loext:opacity="100%" style:font-name="system-ui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ёд различается по источнику нектара, что определяет его вкус, цвет и полезные свойства.</text:p>
      <text:p text:style-name="P2">Цветочный (разнотравье) — универсальный вариант с мягким вкусом. Подходит для ежедневного укрепления иммунитета и общего тонуса. Липовый мёд светлый, ароматный, эффективен при простудах и кашле благодаря мягкому противовоспалительному действию.</text:p>
      <text:p text:style-name="P2">Гречишный отличается тёмным цветом и терпким вкусом; он богат железом, поэтому полезен при анемии и для улучшения состава крови. </text:p>
      <text:p text:style-name="P2">Акациевый мёд долго не кристаллизуется, имеет деликатный вкус и гипоаллергенен, что делает его безопасным выбором для детей и людей с чувствительным организмом.</text:p>
      <text:p text:style-name="P3">Для сохранения пользы храните мёд в сухой таре из стекла или керамики, в защищённом от света месте при температуре не выше 20–25 °C. Избегайте нагрева выше 40 °C и попадания влаги. Соблюдение этих условий предотвращает брожение и разрушение полезных ферментов. Регулярное употребление натурального мёда в умеренных количествах поддерживает здоровье, но важно учитывать индивидуальную переносимость продукта.</text:p>
      <text:p text:style-name="P4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/>
    <style:font-face style:name="system-ui" svg:font-family="system-ui, ui-sans-serif, apple-system, BlinkMacSystemFont, Inter, NotoSansH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5-28T06:08:10.099866184</dc:date>
    <meta:editing-duration>PT12M59S</meta:editing-duration>
    <meta:editing-cycles>2</meta:editing-cycles>
    <meta:document-statistic meta:table-count="0" meta:image-count="0" meta:object-count="0" meta:page-count="1" meta:paragraph-count="5" meta:word-count="138" meta:character-count="1028" meta:non-whitespace-character-count="894"/>
  </office:meta>
</office:document-meta>
</file>