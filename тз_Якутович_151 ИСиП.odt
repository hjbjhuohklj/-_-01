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136cm" fo:text-align="center" style:justify-single-word="false"/>
      <style:text-properties officeooo:paragraph-rsid="0017d72a"/>
    </style:style>
    <style:style style:name="P2" style:family="paragraph" style:parent-style-name="Text_20_body">
      <style:text-properties officeooo:paragraph-rsid="0017d72a"/>
    </style:style>
    <style:style style:name="P3" style:family="paragraph" style:parent-style-name="Text_20_body">
      <style:text-properties style:font-name="Tempora LGC Uni" fo:font-size="13pt" officeooo:rsid="0017d72a" officeooo:paragraph-rsid="0017d72a" style:font-size-asian="13pt" style:font-size-complex="13pt"/>
    </style:style>
    <style:style style:name="P4" style:family="paragraph" style:parent-style-name="Text_20_body">
      <style:text-properties officeooo:rsid="0017d72a" officeooo:paragraph-rsid="0017d72a"/>
    </style:style>
    <style:style style:name="P5" style:family="paragraph" style:parent-style-name="Text_20_body" style:list-style-name="L1">
      <style:text-properties style:font-name="Tempora LGC Uni" fo:font-size="13pt" officeooo:paragraph-rsid="0017d72a" style:font-size-asian="13pt" style:font-size-complex="13pt"/>
    </style:style>
    <style:style style:name="P6" style:family="paragraph" style:parent-style-name="Text_20_body" style:list-style-name="L1">
      <style:text-properties style:font-name="Tempora LGC Uni" fo:font-size="13pt" officeooo:rsid="0017d72a" officeooo:paragraph-rsid="0017d72a" style:font-size-asian="13pt" style:font-size-complex="13pt"/>
    </style:style>
    <style:style style:name="P7" style:family="paragraph" style:parent-style-name="Text_20_body" style:list-style-name="L2">
      <style:text-properties style:font-name="Tempora LGC Uni" fo:font-size="13pt" officeooo:paragraph-rsid="0017d72a" style:font-size-asian="13pt" style:font-size-complex="13pt"/>
    </style:style>
    <style:style style:name="P8" style:family="paragraph" style:parent-style-name="Text_20_body">
      <style:text-properties style:font-name="Tempora LGC Uni" fo:font-size="13pt" officeooo:paragraph-rsid="0017d72a" style:font-size-asian="13pt" style:font-size-complex="13pt"/>
    </style:style>
    <style:style style:name="P9" style:family="paragraph" style:parent-style-name="Text_20_body">
      <style:text-properties style:font-name="Tempora LGC Uni" fo:font-size="13pt" officeooo:rsid="001932ce" officeooo:paragraph-rsid="001932ce" style:font-size-asian="13pt" style:font-size-complex="13pt"/>
    </style:style>
    <style:style style:name="P10" style:family="paragraph" style:parent-style-name="Standard">
      <style:text-properties officeooo:paragraph-rsid="0017d72a"/>
    </style:style>
    <style:style style:name="T1" style:family="text">
      <style:text-properties style:font-name="Times New Roman" style:rfc-language-tag-asian="x-none"/>
    </style:style>
    <style:style style:name="T2" style:family="text">
      <style:text-properties style:font-name="Tempora LGC Uni" fo:font-size="13pt" style:font-size-asian="13pt" style:rfc-language-tag-asian="x-none" style:font-size-complex="13pt"/>
    </style:style>
    <style:style style:name="T3" style:family="text">
      <style:text-properties style:font-name="Tempora LGC Uni" fo:font-size="13pt" officeooo:rsid="0017d72a" style:font-size-asian="13pt" style:rfc-language-tag-asian="x-none" style:font-size-complex="13pt"/>
    </style:style>
    <style:style style:name="T4" style:family="text">
      <style:text-properties style:font-name="Tempora LGC Uni" fo:font-size="13pt" style:font-size-asian="13pt" style:font-size-complex="13pt"/>
    </style:style>
    <style:style style:name="T5" style:family="text">
      <style:text-properties style:font-name="Tempora LGC Uni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Tempora LGC Uni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Tempora LGC Uni" fo:font-size="13pt" fo:font-weight="normal" officeooo:rsid="0017d72a" style:font-size-asian="13pt" style:font-weight-asian="normal" style:font-size-complex="13pt" style:font-weight-complex="normal"/>
    </style:style>
    <style:style style:name="T8" style:family="text">
      <style:text-properties style:font-name="Tempora LGC Uni" fo:font-size="13pt" officeooo:rsid="001932ce" style:font-size-asian="13pt" style:font-size-complex="13pt"/>
    </style:style>
    <style:style style:name="T9" style:family="text">
      <style:text-properties style:font-name="Tempora LGC Uni" fo:font-size="13pt" officeooo:rsid="0017d72a" style:font-size-asian="13pt" style:font-size-complex="13pt"/>
    </style:style>
    <style:style style:name="T10" style:family="text">
      <style:text-properties officeooo:rsid="00199ce2"/>
    </style:style>
    <style:style style:name="T11" style:family="text">
      <style:text-properties officeooo:rsid="0017d72a"/>
    </style:style>
    <style:style style:name="T12" style:family="text">
      <style:text-properties officeooo:rsid="001b93cf"/>
    </style:style>
    <style:style style:name="T13" style:family="text">
      <style:text-properties officeooo:rsid="00205243"/>
    </style:style>
    <style:style style:name="T14" style:family="text">
      <style:text-properties officeooo:rsid="001932c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2">Сайт-справочник «</text:span></text:span><text:span text:style-name="Strong_20_Emphasis"><text:span text:style-name="T3">Виды мёда и их польза</text:span></text:span><text:span text:style-name="Strong_20_Emphasis"><text:span text:style-name="T2">».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5">Цель проекта:</text:span></text:span><text:span text:style-name="Strong_20_Emphasis"><text:span text:style-name="T6"> </text:span></text:span><text:span text:style-name="Strong_20_Emphasis"><text:span text:style-name="T7">Создать удобный и наглядный информационный ресурс, который поможет пользователям разобраться в многообразии сортов мёда,узнать о их свойствах, научиться оценивать качественный продукт от подделки</text:span></text:span></text:p>
      <text:p text:style-name="P2"><text:span text:style-name="Strong_20_Emphasis"><text:span text:style-name="T4">Целевая аудитория:</text:span></text:span><text:span text:style-name="T4"> </text:span></text:p>
      <text:p text:style-name="P3">Возраст: от 18 лет <text:s/>старше.</text:p>
      <text:p text:style-name="P3">Интересы: здоровое питание, народная медицина.</text:p>
      <text:p text:style-name="P3">Уровень знаний: новички и любители, которые хотят расширить свои знания о продуктах пчеловодства.</text:p>
      <text:p text:style-name="P4"><text:span text:style-name="T4">Г</text:span><text:span text:style-name="T8">де они живут</text:span><text:span text:style-name="T4">: </text:span><text:span text:style-name="T8">Россия (</text:span><text:span text:style-name="T4">русскоязычные пользователи</text:span><text:span text:style-name="T8">)</text:span><text:span text:style-name="T4">.</text:span></text:p>
      <text:p text:style-name="P2"><text:span text:style-name="T9"/></text:p>
      <text:p text:style-name="P2"><text:span text:style-name="Strong_20_Emphasis"><text:span text:style-name="T4">Основные разделы сайта (структура):</text:span></text:span><text:span text:style-name="T4"> </text:span></text:p>
      <text:list text:style-name="L1">
        <text:list-item>
          <text:p text:style-name="P5"><text:span text:style-name="T10">Г</text:span>лавная страница с <text:span text:style-name="T11">краткой историей появления мёда.</text:span></text:p>
        </text:list-item>
        <text:list-item>
          <text:p text:style-name="P6"><text:span text:style-name="T12">Вторая страница:</text:span> «виды мёда» описание <text:span text:style-name="T13">2</text:span>-<text:span text:style-name="T13">3</text:span> популярных видов меда, каждому виду указать цвет, вкус и полезные свойства.</text:p>
        </text:list-item>
        <text:list-item>
          <text:p text:style-name="P6"><text:span text:style-name="T12">Третья страница</text:span>: <text:s/>«сорт — лечебные эффекты»</text:p>
        </text:list-item>
        <text:list-item>
          <text:p text:style-name="P5"><text:span text:style-name="T10">Р</text:span>аздел «Об авторе / Контакты» с источниками информации и данными студента.</text:p>
        </text:list-item>
      </text:list>
      <text:p text:style-name="P2"><text:span text:style-name="Strong_20_Emphasis"><text:span text:style-name="T4"/></text:span></text:p>
      <text:p text:style-name="P2"><text:span text:style-name="Strong_20_Emphasis"><text:span text:style-name="T4">Функциональные требования:</text:span></text:span><text:span text:style-name="T4"> </text:span></text:p>
      <text:list text:style-name="L2">
        <text:list-item>
          <text:p text:style-name="P7"><text:span text:style-name="T10">С</text:span>айт должен отображать текстовую информацию.</text:p>
        </text:list-item>
        <text:list-item>
          <text:p text:style-name="P7"><text:span text:style-name="T10">О</text:span>беспечивать переход между разделами через меню.</text:p>
        </text:list-item>
        <text:list-item>
          <text:p text:style-name="P7"><text:span text:style-name="T10">Р</text:span>аботать локально без подключения к Интернету.</text:p>
        </text:list-item>
        <text:list-item>
          <text:p text:style-name="P7"><text:span text:style-name="T10">П</text:span>оддерживать <text:span text:style-name="T11">плавную прокрутку к различным блокам сайта</text:span></text:p>
        </text:list-item>
      </text:list>
      <text:p text:style-name="P8"/>
      <text:p text:style-name="P8"/>
      <text:p text:style-name="P2"><text:span text:style-name="Strong_20_Emphasis"><text:span text:style-name="T4">Нефункциональные требования:</text:span></text:span><text:span text:style-name="T4"> </text:span></text:p>
      <text:p text:style-name="P8">Производительность – <text:span text:style-name="T14">сайт должен загружаться мгновенно так как все ресурсы находятся локально.</text:span></text:p>
      <text:p text:style-name="P8">Удобство использования <text:s/>– <text:span text:style-name="T14">понятный интерфейс, цветовая тема сайта в «медовых» тонах (жёлтый, коричневый)</text:span></text:p>
      <text:p text:style-name="P8"><text:soft-page-break/>Доступность – шрифт не менее 14 px, контрастный <text:span text:style-name="T14">т</text:span>екст </text:p>
      <text:p text:style-name="P9">Безопасность – сайт статический (HTML/CSS/JS), нет форм сбора данных.</text:p>
      <text:p text:style-name="P8">Простота сопровождения – код <text:span text:style-name="T14">должен быть </text:span>структурирован.</text:p>
      <text:p text:style-name="P2"><text:span text:style-name="Strong_20_Emphasis"><text:span text:style-name="T4"/></text:span></text:p>
      <text:p text:style-name="P2"><text:span text:style-name="Strong_20_Emphasis"><text:span text:style-name="T4">Технические условия:</text:span></text:span><text:span text:style-name="T4"> </text:span></text:p>
      <text:p text:style-name="P8">Язык разметки – HTML5.</text:p>
      <text:p text:style-name="P8"><text:span text:style-name="T10">С</text:span>тили – CSS. <text:span text:style-name="T14">(для сетки каталога)</text:span></text:p>
      <text:p text:style-name="P8"><text:span text:style-name="T10">И</text:span>нтерактив – JavaScript <text:span text:style-name="T14">(для фильтра сортов)</text:span>.</text:p>
      <text:p text:style-name="P8"><text:span text:style-name="T10">Л</text:span>окальный запуск – открытием index.html в браузере .</text:p>
      <text:p text:style-name="P8"><text:span text:style-name="T10">Т</text:span>естирование – <text:span text:style-name="T14">Проверка корректности отображения в браузере.</text:span></text:p>
      <text:p text:style-name="P8"><text:span text:style-name="T10">Р</text:span>едактор кода – Visual Studio Code.</text:p>
      <text:p text:style-name="P2"><text:span text:style-name="Strong_20_Emphasis"><text:span text:style-name="T4"/></text:span></text:p>
      <text:p text:style-name="P2"><text:span text:style-name="Strong_20_Emphasis"><text:span text:style-name="T4">Источники информации:</text:span></text:span><text:span text:style-name="T4"> </text:span></text:p>
      <text:p text:style-name="P9">1. Статьи из Википедии о медоносных растениях.</text:p>
      <text:p text:style-name="P9">2. Материалы специализированных порталов о пчеловодстве.</text:p>
      <text:p text:style-name="P9">3. ГОСТ 19792-2017 «Мёд натуральный. Техническе условия».</text:p>
      <text:p text:style-name="P2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5-28T05:06:42.977669459</dc:date>
    <meta:editing-duration>PT1H8M20S</meta:editing-duration>
    <meta:editing-cycles>4</meta:editing-cycles>
    <meta:document-statistic meta:table-count="0" meta:image-count="0" meta:object-count="0" meta:page-count="2" meta:paragraph-count="34" meta:word-count="242" meta:character-count="1901" meta:non-whitespace-character-count="1679"/>
  </office:meta>
</office:document-meta>
</file>